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Heading_20_4">
      <style:text-properties fo:font-size="11pt" fo:font-weight="bold" style:font-size-asian="11pt" style:font-size-complex="11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font-size="11pt" style:font-size-asian="11pt" style:font-size-complex="11pt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fo:font-size="11pt" style:font-size-asian="11pt" style:font-size-complex="11pt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text-properties fo:font-size="11pt" style:font-size-asian="11pt" style:font-size-complex="11pt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text-properties fo:font-size="11pt" style:font-size-asian="11pt" style:font-size-complex="11pt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text-properties fo:font-size="11pt" style:font-size-asian="11pt" style:font-size-complex="11pt"/>
    </style:style>
    <style:style style:name="P13" style:family="paragraph" style:parent-style-name="Heading_20_3">
      <style:text-properties fo:font-size="11pt" fo:font-weight="bold" style:font-size-asian="11pt" style:font-weight-asian="normal" style:font-size-complex="11pt" style:font-weight-complex="normal"/>
    </style:style>
    <style:style style:name="P14" style:family="paragraph" style:parent-style-name="Text_20_body" style:list-style-name="L6">
      <style:text-properties fo:font-size="11pt" style:font-size-asian="11pt" style:font-size-complex="11pt"/>
    </style:style>
    <style:style style:name="P15" style:family="paragraph" style:parent-style-name="Text_20_body"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text-properties fo:font-size="11pt" style:font-size-asian="11pt" style:font-size-complex="11pt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text-properties fo:font-size="11pt" style:font-size-asian="11pt" style:font-size-complex="11pt"/>
    </style:style>
    <style:style style:name="P20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size="11pt" fo:font-weight="bold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officeooo:rsid="00014b1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HEATSHEET TECNICO ANALISI DATI (PANDAS, NUMPY, SEABORN, OS)</text:h>
      <text:h text:style-name="P2" text:outline-level="4">1. Importazione Librerie</text:h>
      <text:list text:style-name="L1">
        <text:list-item>
          <text:p text:style-name="P3"><text:span text:style-name="T1">Comando</text:span><text:span text:style-name="T2">: </text:span><text:span text:style-name="Source_20_Text"><text:span text:style-name="T2">import pandas as pd</text:span></text:span><text:span text:style-name="T2">, </text:span><text:span text:style-name="Source_20_Text"><text:span text:style-name="T2">import numpy as np</text:span></text:span><text:span text:style-name="T2">, </text:span><text:span text:style-name="Source_20_Text"><text:span text:style-name="T2">import seaborn as sns</text:span></text:span></text:p>
        </text:list-item>
        <text:list-item>
          <text:p text:style-name="P4"><text:span text:style-name="T3">Spiegazione</text:span>: Carica le librerie fondamentali per la manipolazione dati, calcolo numerico e visualizzazione.</text:p>
        </text:list-item>
      </text:list>
      <text:h text:style-name="P2" text:outline-level="4">2. Working Directory</text:h>
      <text:list text:style-name="L2">
        <text:list-item>
          <text:p text:style-name="P5"><text:span text:style-name="T1">Comando</text:span><text:span text:style-name="T2">: </text:span><text:span text:style-name="Source_20_Text"><text:span text:style-name="T2">import os</text:span></text:span><text:span text:style-name="T2">, </text:span><text:span text:style-name="Source_20_Text"><text:span text:style-name="T2">os.getcwd()</text:span></text:span></text:p>
        </text:list-item>
        <text:list-item>
          <text:p text:style-name="P6"><text:span text:style-name="T3">Spiegazione</text:span>: Restituisce il percorso della cartella di lavoro corrente.</text:p>
        </text:list-item>
        <text:list-item>
          <text:p text:style-name="P5"><text:span text:style-name="T1">Esempio</text:span><text:span text:style-name="T2">: </text:span><text:span text:style-name="Source_20_Text"><text:span text:style-name="T2">print(os.getcwd())</text:span></text:span></text:p>
        </text:list-item>
        <text:list-item>
          <text:p text:style-name="P5"><text:span text:style-name="T1">Comando</text:span><text:span text:style-name="T2">: </text:span><text:span text:style-name="Source_20_Text"><text:span text:style-name="T2">os.chdir(path)</text:span></text:span></text:p>
        </text:list-item>
        <text:list-item>
          <text:p text:style-name="P5"><text:span text:style-name="T1">Parametri</text:span><text:span text:style-name="T2">: </text:span><text:span text:style-name="Source_20_Text"><text:span text:style-name="T2">path</text:span></text:span><text:span text:style-name="T2"> (stringa con il percorso fisico della cartella).</text:span></text:p>
        </text:list-item>
        <text:list-item>
          <text:p text:style-name="P6"><text:span text:style-name="T3">Spiegazione</text:span>: Imposta una nuova cartella di lavoro per il caricamento dei file.</text:p>
        </text:list-item>
        <text:list-item>
          <text:p text:style-name="P5"><text:span text:style-name="T1">Esempio</text:span><text:span text:style-name="T2">: </text:span><text:span text:style-name="Source_20_Text"><text:span text:style-name="T2">os.chdir("C:/Users/...")</text:span></text:span></text:p>
        </text:list-item>
      </text:list>
      <text:h text:style-name="P2" text:outline-level="4">3. Caricamento Dati</text:h>
      <text:list text:style-name="L3">
        <text:list-item>
          <text:p text:style-name="P7"><text:span text:style-name="T1">Comando</text:span><text:span text:style-name="T2">: </text:span><text:span text:style-name="Source_20_Text"><text:span text:style-name="T2">pd.read_csv(filepath_or_buffer)</text:span></text:span></text:p>
        </text:list-item>
        <text:list-item>
          <text:p text:style-name="P7"><text:span text:style-name="T1">Parametri</text:span><text:span text:style-name="T2">: </text:span><text:span text:style-name="Source_20_Text"><text:span text:style-name="T2">filepath_or_buffer</text:span></text:span><text:span text:style-name="T2"> (nome o percorso del file .csv).</text:span></text:p>
        </text:list-item>
        <text:list-item>
          <text:p text:style-name="P8"><text:span text:style-name="T3">Spiegazione</text:span>: Legge i dati da un file CSV e li trasforma in un DataFrame.</text:p>
        </text:list-item>
        <text:list-item>
          <text:p text:style-name="P7"><text:span text:style-name="T1">Esempio</text:span><text:span text:style-name="T2">: </text:span><text:span text:style-name="Source_20_Text"><text:span text:style-name="T2">df = pd.read_csv('penguins.csv')</text:span></text:span></text:p>
        </text:list-item>
      </text:list>
      <text:h text:style-name="P2" text:outline-level="4">4. Analisi Esplorativa</text:h>
      <text:list text:style-name="L4">
        <text:list-item>
          <text:p text:style-name="P9"><text:span text:style-name="T1">Attributo</text:span><text:span text:style-name="T2">: </text:span><text:span text:style-name="Source_20_Text"><text:span text:style-name="T2">df.shape</text:span></text:span></text:p>
        </text:list-item>
        <text:list-item>
          <text:p text:style-name="P10"><text:span text:style-name="T3">Spiegazione</text:span>: Restituisce il numero di righe e di colonne del dataset.</text:p>
        </text:list-item>
        <text:list-item>
          <text:p text:style-name="P9"><text:span text:style-name="T1">Attributo</text:span><text:span text:style-name="T2">: </text:span><text:span text:style-name="Source_20_Text"><text:span text:style-name="T2">df.columns</text:span></text:span></text:p>
        </text:list-item>
        <text:list-item>
          <text:p text:style-name="P10"><text:span text:style-name="T3">Spiegazione</text:span>: Visualizza o modifica le etichette delle colonne.</text:p>
        </text:list-item>
        <text:list-item>
          <text:p text:style-name="P9"><text:span text:style-name="T1">Esempio</text:span><text:span text:style-name="T2">: </text:span><text:span text:style-name="Source_20_Text"><text:span text:style-name="T2">df.columns = ['specie', 'isola', ...]</text:span></text:span></text:p>
        </text:list-item>
      </text:list>
      <text:h text:style-name="P2" text:outline-level="4">5. Screening Strutturale</text:h>
      <text:list text:style-name="L5">
        <text:list-item>
          <text:p text:style-name="P11"><text:span text:style-name="T1">Metodo</text:span><text:span text:style-name="T2">: </text:span><text:span text:style-name="Source_20_Text"><text:span text:style-name="T2">df.info()</text:span></text:span></text:p>
        </text:list-item>
        <text:list-item>
          <text:p text:style-name="P11"><text:span text:style-name="T1">Spiegazione</text:span><text:span text:style-name="T2">: Mostra il tipo di dato (</text:span><text:span text:style-name="Source_20_Text"><text:span text:style-name="T2">Dtype</text:span></text:span><text:span text:style-name="T2">) di ogni colonna e il conteggio dei valori non nulli per identificare anomalie.</text:span></text:p>
        </text:list-item>
        <text:list-item>
          <text:p text:style-name="P11"><text:span text:style-name="T1">Metodo</text:span><text:span text:style-name="T2">: </text:span><text:span text:style-name="Source_20_Text"><text:span text:style-name="T2">df.describe()</text:span></text:span></text:p>
        </text:list-item>
        <text:list-item>
          <text:p text:style-name="P12"><text:span text:style-name="T3">Spiegazione</text:span>: Genera statistiche descrittive (media, std, min, max, quartili) per le colonne numeriche.</text:p>
        </text:list-item>
        <text:list-item>
          <text:p text:style-name="P11"><text:span text:style-name="T1">Metodo</text:span><text:span text:style-name="T2">: </text:span><text:span text:style-name="Source_20_Text"><text:span text:style-name="T2">df.sample(n)</text:span></text:span></text:p>
        </text:list-item>
        <text:list-item>
          <text:p text:style-name="P11"><text:span text:style-name="T1">Parametri</text:span><text:span text:style-name="T2">: </text:span><text:span text:style-name="Source_20_Text"><text:span text:style-name="T2">n</text:span></text:span><text:span text:style-name="T2"> (numero intero di righe da estrarre).</text:span></text:p>
        </text:list-item>
        <text:list-item>
          <text:p text:style-name="P12"><text:soft-page-break/><text:span text:style-name="T3">Spiegazione</text:span>: Estrae un campione casuale di dati per un controllo rapido del contenuto.</text:p>
        </text:list-item>
        <text:list-item>
          <text:p text:style-name="P11"><text:span text:style-name="T1">Metodo</text:span><text:span text:style-name="T2">: </text:span><text:span text:style-name="Source_20_Text"><text:span text:style-name="T2">df.nunique()</text:span></text:span></text:p>
        </text:list-item>
        <text:list-item>
          <text:p text:style-name="P12"><text:span text:style-name="T3">Spiegazione</text:span>: Conta i valori univoci per ogni colonna; utile per eliminare colonne con una sola modalità.</text:p>
        </text:list-item>
        <text:list-item>
          <text:p text:style-name="P11"><text:span text:style-name="T1">Metodo</text:span><text:span text:style-name="T2">: </text:span><text:span text:style-name="Source_20_Text"><text:span text:style-name="T2">df.column.unique()</text:span></text:span></text:p>
        </text:list-item>
        <text:list-item>
          <text:p text:style-name="P12"><text:span text:style-name="T3">Spiegazione</text:span>: Elenca le modalità distinte presenti in una specifica colonna.</text:p>
        </text:list-item>
      </text:list>
      <text:h text:style-name="P13" text:outline-level="3"><text:span text:style-name="T4">6.</text:span> Grafici Esplorativi (Data Visualization)</text:h>
      <text:list text:style-name="L6">
        <text:list-item>
          <text:p text:style-name="P14"><text:span text:style-name="T3">Comando</text:span>: <text:span text:style-name="Source_20_Text">sns.countplot(data, x, hue)</text:span></text:p>
          <text:list>
            <text:list-item>
              <text:p text:style-name="P14"><text:span text:style-name="T3">Parametri</text:span>: <text:span text:style-name="Source_20_Text">data</text:span> (il DataFrame), <text:span text:style-name="Source_20_Text">x</text:span> (variabile categoriale sull'asse X), <text:span text:style-name="Source_20_Text">hue</text:span> (variabile per la legenda/raggruppamento).</text:p>
            </text:list-item>
            <text:list-item>
              <text:p text:style-name="P14"><text:span text:style-name="T3">Spiegazione</text:span>: Crea un grafico a barre che mostra il conteggio delle osservazioni per ogni categoria.</text:p>
            </text:list-item>
            <text:list-item>
              <text:p text:style-name="P14"><text:span text:style-name="T3">Esempio</text:span>: <text:span text:style-name="Source_20_Text">sns.countplot(data=df, x='isola', hue='specie')</text:span></text:p>
            </text:list-item>
          </text:list>
        </text:list-item>
        <text:list-item>
          <text:p text:style-name="P14"><text:span text:style-name="T3">Comando</text:span>: <text:span text:style-name="Source_20_Text">sns.histplot(data, x, kde, hue)</text:span></text:p>
          <text:list>
            <text:list-item>
              <text:p text:style-name="P14"><text:span text:style-name="T3">Parametri</text:span>: <text:span text:style-name="Source_20_Text">data</text:span> (il DataFrame), <text:span text:style-name="Source_20_Text">x</text:span> (variabile numerica), <text:span text:style-name="Source_20_Text">kde=True</text:span> (aggiunge la linea della densità stimata), <text:span text:style-name="Source_20_Text">hue</text:span> (confronto tra gruppi).</text:p>
            </text:list-item>
            <text:list-item>
              <text:p text:style-name="P14"><text:span text:style-name="T3">Spiegazione</text:span>: Visualizza la distribuzione di una variabile numerica e la sua frequenza.</text:p>
            </text:list-item>
            <text:list-item>
              <text:p text:style-name="P14"><text:span text:style-name="T3">Esempio</text:span>: <text:span text:style-name="Source_20_Text">sns.histplot(data=df, x='massa_corporea_g', kde=True)</text:span></text:p>
            </text:list-item>
          </text:list>
        </text:list-item>
        <text:list-item>
          <text:p text:style-name="P14"><text:span text:style-name="T3">Comando</text:span>: <text:span text:style-name="Source_20_Text">sns.boxplot(data, x, y, hue)</text:span></text:p>
          <text:list>
            <text:list-item>
              <text:p text:style-name="P14"><text:span text:style-name="T3">Parametri</text:span>: <text:span text:style-name="Source_20_Text">data</text:span>, <text:span text:style-name="Source_20_Text">x</text:span> (variabile categoriale), <text:span text:style-name="Source_20_Text">y</text:span> (variabile numerica), <text:span text:style-name="Source_20_Text">hue</text:span>.</text:p>
            </text:list-item>
            <text:list-item>
              <text:p text:style-name="P14"><text:span text:style-name="T3">Spiegazione</text:span>: Rappresenta la distribuzione dei dati tramite quartili e permette di individuare visivamente gli <text:span text:style-name="T3">outlier</text:span> (valori anomali).</text:p>
            </text:list-item>
            <text:list-item>
              <text:p text:style-name="P14"><text:span text:style-name="T3">Esempio</text:span>: <text:span text:style-name="Source_20_Text">sns.boxplot(data=df, x='specie', y='massa_corporea_g')</text:span></text:p>
            </text:list-item>
          </text:list>
        </text:list-item>
        <text:list-item>
          <text:p text:style-name="P14"><text:span text:style-name="T3">Comando</text:span>: <text:span text:style-name="Source_20_Text">sns.scatterplot(data, x, y, hue, style)</text:span></text:p>
          <text:list>
            <text:list-item>
              <text:p text:style-name="P14"><text:span text:style-name="T3">Parametri</text:span>: <text:span text:style-name="Source_20_Text">x</text:span> e <text:span text:style-name="Source_20_Text">y</text:span> (entrambe variabili numeriche), <text:span text:style-name="Source_20_Text">hue</text:span> (colore), <text:span text:style-name="Source_20_Text">style</text:span> (forma dei punti).</text:p>
            </text:list-item>
            <text:list-item>
              <text:p text:style-name="P14"><text:span text:style-name="T3">Spiegazione</text:span>: Grafico a dispersione per analizzare la correlazione tra due misure numeriche.</text:p>
            </text:list-item>
            <text:list-item>
              <text:p text:style-name="P14"><text:span text:style-name="T3">Esempio</text:span>: <text:span text:style-name="Source_20_Text">sns.scatterplot(data=df, x='lunghezza_becco_mm', y='profondità_becco_mm', hue='specie')</text:span></text:p>
            </text:list-item>
          </text:list>
        </text:list-item>
        <text:list-item>
          <text:p text:style-name="P14"><text:span text:style-name="T3">Comando</text:span>: <text:span text:style-name="Source_20_Text">sns.pairplot(data, hue)</text:span></text:p>
          <text:list>
            <text:list-item>
              <text:p text:style-name="P14"><text:span text:style-name="T3">Parametri</text:span>: <text:span text:style-name="Source_20_Text">data</text:span>, <text:span text:style-name="Source_20_Text">hue</text:span> (variabile di raggruppamento).</text:p>
            </text:list-item>
            <text:list-item>
              <text:p text:style-name="P14"><text:span text:style-name="T3">Spiegazione</text:span>: Crea una matrice di grafici per visualizzare istogrammi e scatterplot di tutte le combinazioni di variabili numeriche nel dataset.</text:p>
            </text:list-item>
            <text:list-item>
              <text:p text:style-name="P14"><text:span text:style-name="T3">Esempio</text:span>: <text:span text:style-name="Source_20_Text">sns.pairplot(df, hue='specie')</text:span></text:p>
            </text:list-item>
          </text:list>
        </text:list-item>
      </text:list>
      <text:p text:style-name="P15"/>
      <text:h text:style-name="P2" text:outline-level="4"><text:soft-page-break/><text:span text:style-name="T4">7</text:span>. Gestione Valori Mancanti (Missing Value)</text:h>
      <text:list text:style-name="L7">
        <text:list-item>
          <text:p text:style-name="P16"><text:span text:style-name="T1">Metodo</text:span><text:span text:style-name="T2">: </text:span><text:span text:style-name="Source_20_Text"><text:span text:style-name="T2">df.isna()</text:span></text:span></text:p>
        </text:list-item>
        <text:list-item>
          <text:p text:style-name="P17"><text:span text:style-name="T3">Spiegazione</text:span>: Identifica i valori mancanti restituendo una tabella di valori booleani.</text:p>
        </text:list-item>
        <text:list-item>
          <text:p text:style-name="P16"><text:span text:style-name="T1">Metodo</text:span><text:span text:style-name="T2">: </text:span><text:span text:style-name="Source_20_Text"><text:span text:style-name="T2">df.isna().sum(axis)</text:span></text:span></text:p>
        </text:list-item>
        <text:list-item>
          <text:p text:style-name="P16"><text:span text:style-name="T1">Parametri</text:span><text:span text:style-name="T2">: </text:span><text:span text:style-name="Source_20_Text"><text:span text:style-name="T2">axis=0</text:span></text:span><text:span text:style-name="T2"> (indica di sommare scorrendo le colonne).</text:span></text:p>
        </text:list-item>
        <text:list-item>
          <text:p text:style-name="P17"><text:span text:style-name="T3">Spiegazione</text:span>: Fornisce il totale dei valori mancanti per ogni singola colonna.</text:p>
        </text:list-item>
        <text:list-item>
          <text:p text:style-name="P16"><text:span text:style-name="T1">Metodo</text:span><text:span text:style-name="T2">: </text:span><text:span text:style-name="Source_20_Text"><text:span text:style-name="T2">df.dropna(inplace)</text:span></text:span></text:p>
        </text:list-item>
        <text:list-item>
          <text:p text:style-name="P16"><text:span text:style-name="T1">Parametri</text:span><text:span text:style-name="T2">: </text:span><text:span text:style-name="Source_20_Text"><text:span text:style-name="T2">inplace=True</text:span></text:span><text:span text:style-name="T2"> (applica la modifica direttamente all'oggetto originale senza crearne una copia).</text:span></text:p>
        </text:list-item>
        <text:list-item>
          <text:p text:style-name="P17"><text:span text:style-name="T3">Spiegazione</text:span>: Elimina le righe che contengono valori mancanti.</text:p>
        </text:list-item>
        <text:list-item>
          <text:p text:style-name="P16"><text:span text:style-name="T1">Metodo</text:span><text:span text:style-name="T2">: </text:span><text:span text:style-name="Source_20_Text"><text:span text:style-name="T2">df.column.fillna(value, inplace)</text:span></text:span></text:p>
        </text:list-item>
        <text:list-item>
          <text:p text:style-name="P16"><text:span text:style-name="T1">Parametri</text:span><text:span text:style-name="T2">: </text:span><text:span text:style-name="Source_20_Text"><text:span text:style-name="T2">value</text:span></text:span><text:span text:style-name="T2"> (valore da inserire, es: </text:span><text:span text:style-name="Source_20_Text"><text:span text:style-name="T2">1.0</text:span></text:span><text:span text:style-name="T2">), </text:span><text:span text:style-name="Source_20_Text"><text:span text:style-name="T2">inplace=True</text:span></text:span><text:span text:style-name="T2">.</text:span></text:p>
        </text:list-item>
        <text:list-item>
          <text:p text:style-name="P16"><text:span text:style-name="T1">Spiegazione</text:span><text:span text:style-name="T2">: Sostituisce i valori </text:span><text:span text:style-name="Source_20_Text"><text:span text:style-name="T2">NaN</text:span></text:span><text:span text:style-name="T2"> con un valore specifico scelto dall'analista.</text:span></text:p>
        </text:list-item>
      </text:list>
      <text:h text:style-name="P2" text:outline-level="4"><text:span text:style-name="T4">8</text:span>. Trasformazione e Categorizzazione (Data Cleaning Professionale)</text:h>
      <text:list text:style-name="L8">
        <text:list-item>
          <text:p text:style-name="P18"><text:span text:style-name="T1">Metodo</text:span><text:span text:style-name="T2">: </text:span><text:span text:style-name="Source_20_Text"><text:span text:style-name="T2">df.column.astype(dtype)</text:span></text:span></text:p>
        </text:list-item>
        <text:list-item>
          <text:p text:style-name="P18"><text:span text:style-name="T1">Parametri</text:span><text:span text:style-name="T2">: </text:span><text:span text:style-name="Source_20_Text"><text:span text:style-name="T2">dtype</text:span></text:span><text:span text:style-name="T2"> (tipo di dato, es: </text:span><text:span text:style-name="Source_20_Text"><text:span text:style-name="T2">'category'</text:span></text:span><text:span text:style-name="T2">).</text:span></text:p>
        </text:list-item>
        <text:list-item>
          <text:p text:style-name="P19"><text:span text:style-name="T3">Spiegazione</text:span>: Converte il tipo di dato di una colonna (Casting), utile per ottimizzare la memoria.</text:p>
        </text:list-item>
        <text:list-item>
          <text:p text:style-name="P18"><text:span text:style-name="T1">Funzione</text:span><text:span text:style-name="T2">: </text:span><text:span text:style-name="Source_20_Text"><text:span text:style-name="T2">pd.cut(x, bins, labels)</text:span></text:span></text:p>
        </text:list-item>
        <text:list-item>
          <text:p text:style-name="P18"><text:span text:style-name="T1">Parametri</text:span><text:span text:style-name="T2">: </text:span><text:span text:style-name="Source_20_Text"><text:span text:style-name="T2">x</text:span></text:span><text:span text:style-name="T2"> (colonna numerica), </text:span><text:span text:style-name="Source_20_Text"><text:span text:style-name="T2">bins</text:span></text:span><text:span text:style-name="T2"> (numero di intervalli), </text:span><text:span text:style-name="Source_20_Text"><text:span text:style-name="T2">labels</text:span></text:span><text:span text:style-name="T2"> (etichette delle classi).</text:span></text:p>
        </text:list-item>
        <text:list-item>
          <text:p text:style-name="P19"><text:span text:style-name="T3">Spiegazione</text:span>: Trasforma una variabile numerica continua in una variabile categoriale (Binning).</text:p>
        </text:list-item>
        <text:list-item>
          <text:p text:style-name="P18"><text:span text:style-name="T1">Esempio</text:span><text:span text:style-name="T2">: </text:span><text:span text:style-name="Source_20_Text"><text:span text:style-name="T2">pd.cut(df.massa_corporea_g, bins=3, labels=['Small', 'Medium', 'Large'])</text:span></text:span></text:p>
        </text:list-item>
        <text:list-item>
          <text:p text:style-name="P18"><text:span text:style-name="T1">Funzione</text:span><text:span text:style-name="T2">: </text:span><text:span text:style-name="Source_20_Text"><text:span text:style-name="T2">pd.crosstab(index, columns, margins, normalize)</text:span></text:span></text:p>
        </text:list-item>
        <text:list-item>
          <text:p text:style-name="P18"><text:span text:style-name="T1">Parametri</text:span><text:span text:style-name="T2">: </text:span><text:span text:style-name="Source_20_Text"><text:span text:style-name="T2">index</text:span></text:span><text:span text:style-name="T2"> (righe), </text:span><text:span text:style-name="Source_20_Text"><text:span text:style-name="T2">columns</text:span></text:span><text:span text:style-name="T2"> (colonne), </text:span><text:span text:style-name="Source_20_Text"><text:span text:style-name="T2">margins=True</text:span></text:span><text:span text:style-name="T2"> (totali), </text:span><text:span text:style-name="Source_20_Text"><text:span text:style-name="T2">normalize='index'</text:span></text:span><text:span text:style-name="T2"> (calcola frequenze condizionate rispetto alla riga).</text:span></text:p>
        </text:list-item>
        <text:list-item>
          <text:p text:style-name="P19"><text:span text:style-name="T3">Spiegazione</text:span>: Crea una tabella di contingenza per analizzare le relazioni tra variabili categoriali.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SC" style:font-family-asian="'Noto Serif SC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0T14:10:07.926632000</meta:creation-date>
    <dc:date>2026-05-10T14:58:24.441578500</dc:date>
    <meta:editing-duration>PT11M23S</meta:editing-duration>
    <meta:editing-cycles>3</meta:editing-cycles>
    <meta:generator>LibreOffice/25.8.5.2$Windows_X86_64 LibreOffice_project/9c8b85f387cc00a89945a79c9e6239f32e450ac2</meta:generator>
    <meta:document-statistic meta:table-count="0" meta:image-count="0" meta:object-count="0" meta:page-count="3" meta:paragraph-count="79" meta:word-count="670" meta:character-count="4909" meta:non-whitespace-character-count="4388"/>
  </office:meta>
</office:document-meta>
</file>